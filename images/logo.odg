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300BE9D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14cm, 2.864cm, 2.564cm, 2.81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069cm" svg:height="11cm" svg:x="5.25cm" svg:y="9.25cm">
          <draw:image xlink:href="Pictures/10000001000001F4000001F4300BE9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4-18T16:28:58.917451200</dc:date>
    <meta:editing-duration>PT58S</meta:editing-duration>
    <meta:editing-cycles>1</meta:editing-cycles>
    <meta:document-statistic meta:object-count="1"/>
    <meta:generator>LibreOffice/26.2.0.3$Windows_X86_64 LibreOffice_project/620$Build-3</meta:generator>
  </office:meta>
</office:document-meta>
</file>